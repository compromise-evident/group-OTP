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4c5d3" officeooo:paragraph-rsid="0014c5d3" style:font-size-asian="20pt" style:font-weight-asian="bold" style:font-size-complex="20pt" style:font-weight-complex="bold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  <style:text-properties fo:font-family="Cantarell" style:font-pitch="variable"/>
    </style:style>
    <style:style style:name="P4" style:family="paragraph">
      <loext:graphic-properties draw:fill-color="#b2b2b2"/>
      <style:text-properties fo:font-family="Cantarell" style:font-pitch="variable"/>
    </style:style>
    <style:style style:name="P5" style:family="paragraph">
      <loext:graphic-properties draw:fill-color="#b2b2b2"/>
      <style:paragraph-properties fo:text-align="center"/>
      <style:text-properties fo:font-family="Cantarell" style:font-pitch="variable"/>
    </style:style>
    <style:style style:name="P6" style:family="paragraph">
      <loext:graphic-properties draw:fill-color="#b2b2b2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b2b2b2" loext:opacity="100%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color="#b2b2b2" loext:opacity="100%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loext:opacity="100%" fo:font-family="Cantarell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loext:opacity="100%" fo:font-family="Cantarell" style:font-pitch="variable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b2b2b2" loext:opacity="100%" fo:font-size="10pt" fo:font-style="italic" fo:font-weight="bold" style:font-size-asian="8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b2b2b2" loext:opacity="100%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7.0665in" fo:min-width="8.5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b2b2b2" draw:textarea-horizontal-align="justify" draw:textarea-vertical-align="middle" draw:auto-grow-height="false" fo:min-height="1.128in" fo:min-width="1.984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111111" draw:fill-color="#b2b2b2" draw:textarea-horizontal-align="justify" draw:textarea-vertical-align="middle" draw:auto-grow-height="false" fo:min-height="0.0709in" fo:min-width="0.5016in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673in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tyle:writing-mode="lr-tb" loext:decorative="false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335in" loext:decorative="false" style:run-through="foreground"/>
      <style:paragraph-properties style:writing-mode="lr-tb"/>
    </style:style>
    <style:style style:name="gr7" style:family="graphic">
      <style:graphic-properties draw:stroke="none" svg:stroke-color="#111111" draw:fill-color="#b2b2b2" draw:textarea-horizontal-align="justify" draw:textarea-vertical-align="middle" draw:auto-grow-height="false" fo:min-height="0.1165in" fo:min-width="1.5839in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5" draw:style-name="gr1" draw:text-style-name="P2" svg:width="8.5894in" svg:height="7.0669in" svg:x="0.5173in" svg:y="-0.4453in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custom-shape text:anchor-type="paragraph" draw:z-index="4" draw:name="Shape 1" draw:style-name="gr2" draw:text-style-name="P4" svg:width="2.0421in" svg:height="1.185in" svg:x="1.6098in" svg:y="0.0083in"><text:p text:style-name="P3"><text:span text:style-name="T1">Alice</text:span></text:p><text:p text:style-name="P3"><text:span text:style-name="T2">offline machine</text:span></text:p><draw:enhanced-geometry svg:viewBox="0 0 21600 21600" draw:path-stretchpoint-x="10800" draw:path-stretchpoint-y="10800" draw:text-areas="?f3 ?f4 ?f5 ?f6" draw:type="round-rectangle" draw:modifiers="1796.8365553602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position-x="$0" draw:handle-position-y="top" draw:handle-switched="true" draw:handle-range-x-minimum="0" draw:handle-range-x-maximum="10800"/></draw:enhanced-geometry></draw:custom-shape><draw:custom-shape text:anchor-type="paragraph" draw:z-index="5" draw:name="Shape 2" draw:style-name="gr2" draw:text-style-name="P5" svg:width="2.0421in" svg:height="1.185in" svg:x="5.9083in" svg:y="0.0083in"><text:p text:style-name="P3"><text:span text:style-name="T1">Bob</text:span></text:p><text:p text:style-name="P3"><text:span text:style-name="T2">offline machine</text:span></text:p><draw:enhanced-geometry svg:viewBox="0 0 21600 21600" draw:path-stretchpoint-x="10800" draw:path-stretchpoint-y="10800" draw:text-areas="?f3 ?f4 ?f5 ?f6" draw:type="round-rectangle" draw:modifiers="1796.8365553602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position-x="$0" draw:handle-position-y="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><draw:custom-shape text:anchor-type="paragraph" draw:z-index="3" draw:name="Shape 17" draw:style-name="gr3" draw:text-style-name="P6" svg:width="0.6252in" svg:height="0.1413in" draw:transform="rotate (-1.5707963267949) translate (1.80208333333333in 0.0173611111111111in)"><text:p/>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draw:custom-shape text:anchor-type="paragraph" draw:z-index="6" draw:name="Shape 3" draw:style-name="gr3" draw:text-style-name="P6" svg:width="0.6252in" svg:height="0.1413in" draw:transform="rotate (-1.5707963267949) translate (7.87569444444444in 0.0173611111111111in)"><text:p/>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draw:frame text:anchor-type="paragraph" draw:z-index="2" draw:name="Shape 16" draw:style-name="gr4" draw:text-style-name="P8" svg:width="1.6906in" svg:height="0.7677in" svg:x="1.7783in" svg:y="0.0173in"><draw:text-box><text:p text:style-name="P7"><text:span text:style-name="T3">passing only ciphertext</text:span></text:p><text:p text:style-name="P7"><text:span text:style-name="T3">through Restricted</text:span></text:p><text:p text:style-name="P7"><text:span text:style-name="T3">Interface Computation</text:span></text:p><text:p text:style-name="P7"><text:span text:style-name="T3">Isolation Network</text:span></text:p></draw:text-box></draw:frame><draw:frame text:anchor-type="paragraph" draw:z-index="7" draw:name="Shape 4" draw:style-name="gr4" draw:text-style-name="P8" svg:width="1.6906in" svg:height="0.7677in" svg:x="6.0811in" svg:y="0.0173in"><draw:text-box><text:p text:style-name="P7"><text:span text:style-name="T3">passing only ciphertext</text:span></text:p><text:p text:style-name="P7"><text:span text:style-name="T3">through Restricted</text:span></text:p><text:p text:style-name="P7"><text:span text:style-name="T3">Interface Computation</text:span></text:p><text:p text:style-name="P7"><text:span text:style-name="T3">Isolation Network</text:span></text:p></draw:text-box></draw:frame></text:p>
      <text:p text:style-name="P1"/>
      <text:p text:style-name="P1"><draw:custom-shape text:anchor-type="paragraph" draw:z-index="9" draw:name="Shape 7" draw:style-name="gr2" draw:text-style-name="P5" svg:width="2.0421in" svg:height="1.185in" svg:x="5.9083in" svg:y="0.0984in"><text:p text:style-name="P3"><text:span text:style-name="T2">online machine</text:span></text:p><draw:enhanced-geometry svg:viewBox="0 0 21600 21600" draw:path-stretchpoint-x="10800" draw:path-stretchpoint-y="10800" draw:text-areas="?f3 ?f4 ?f5 ?f6" draw:type="round-rectangle" draw:modifiers="1796.8365553602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position-x="$0" draw:handle-position-y="top" draw:handle-switched="true" draw:handle-range-x-minimum="0" draw:handle-range-x-maximum="10800"/></draw:enhanced-geometry></draw:custom-shape><draw:custom-shape text:anchor-type="paragraph" draw:z-index="8" draw:name="Shape 6" draw:style-name="gr2" draw:text-style-name="P5" svg:width="2.0421in" svg:height="1.185in" svg:x="1.6098in" svg:y="0.1008in"><text:p text:style-name="P3"><text:span text:style-name="T2">online machine</text:span></text:p><draw:enhanced-geometry svg:viewBox="0 0 21600 21600" draw:path-stretchpoint-x="10800" draw:path-stretchpoint-y="10800" draw:text-areas="?f3 ?f4 ?f5 ?f6" draw:mirror-horizontal="false" draw:mirror-vertical="false" draw:type="round-rectangle" draw:modifiers="1796.8365553602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position-x="$0" draw:handle-position-y="top" draw:handle-switched="true" draw:handle-range-x-minimum="0" draw:handle-range-x-maximum="10800"/></draw:enhanced-geometry></draw:custom-shape></text:p>
      <text:p text:style-name="P1"><draw:g text:anchor-type="paragraph" draw:z-index="1" draw:name="DrawObject1" draw:style-name="gr5"><draw:frame draw:name="Shape2_ 3" draw:style-name="gr6" draw:text-style-name="P9" svg:width="1.8571in" svg:height="0.2335in" svg:x="3.8736in" svg:y="0.5047in"><draw:text-box><text:p><text:span text:style-name="T4">messaging only ciphertext</text:span></text:p></draw:text-box></draw:frame><draw:custom-shape draw:name="Shape 15" draw:style-name="gr7" draw:text-style-name="P6" svg:width="1.7969in" svg:height="0.2059in" svg:x="3.8728in" svg:y="0.2665in"><text:p/><draw:enhanced-geometry svg:viewBox="0 0 21600 21600" draw:text-areas="?f5 ?f1 ?f6 ?f3" draw:type="left-right-arrow" draw:modifiers="2273.68421052632 4721.31147540984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stroke-dash draw:name="Dot" draw:style="rect" draw:dots1="1" draw:dots1-length="100%" draw:distance="1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12T00:58:02.096046167</meta:creation-date>
    <dc:date>2026-06-09T17:56:14.387870899</dc:date>
    <meta:editing-duration>PT2H29M46S</meta:editing-duration>
    <meta:editing-cycles>49</meta:editing-cycles>
    <meta:generator>LibreOffice/25.2.3.2$Linux_X86_64 LibreOffice_project/52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